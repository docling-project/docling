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language="en" fo:country="CH"/>
    </style:style>
    <style:style style:family="paragraph" style:name="a944">
      <style:paragraph-properties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7">
      <style:text-properties fo:language="en" fo:country="CH"/>
    </style:style>
    <style:style style:family="paragraph" style:name="a948">
      <style:paragraph-properties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draw:fill="none" draw:stroke="solid" svg:stroke-width="0.01389in" svg:stroke-color="#000000" svg:stroke-opacity="100%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draw:fill="none" draw:stroke="non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language="en" fo:country="CH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/>
    </style:style>
    <style:style style:family="graphic" style:name="a11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language="en" fo:country="CH"/>
    </style:style>
    <style:style style:family="paragraph" style:name="a836">
      <style:paragraph-properties/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9">
      <style:table-row-properties style:row-height="0.40556in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1">
      <style:table-row-properties style:row-height="0.40556in"/>
    </style:style>
    <style:style style:family="text" style:name="a952">
      <style:text-properties fo:language="en" fo:country="CH"/>
    </style:style>
    <style:style style:family="paragraph" style:name="a953">
      <style:paragraph-properties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fo:language="en" fo:country="CH"/>
    </style:style>
    <style:style style:family="paragraph" style:name="a957">
      <style:paragraph-properties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92">
      <style:table-properties style:writing-mode="lr-tb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93">
      <style:table-column-properties style:column-width="1.26984in"/>
    </style:style>
    <style:style style:family="table-column" style:name="a794">
      <style:table-column-properties style:column-width="1.26984in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795">
      <style:table-column-properties style:column-width="1.26984in"/>
    </style:style>
    <style:style style:family="paragraph" style:name="a11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96">
      <style:table-column-properties style:column-width="1.26984in"/>
    </style:style>
    <style:style style:family="table-column" style:name="a797">
      <style:table-column-properties style:column-width="1.26984in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98">
      <style:table-column-properties style:column-width="1.26984in"/>
    </style:style>
    <style:style style:family="paragraph" style:name="a11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language="en" fo:country="CH"/>
    </style:style>
    <style:style style:family="table-column" style:name="a799">
      <style:table-column-properties style:column-width="1.26984in"/>
    </style:style>
    <style:style style:family="paragraph" style:name="a841">
      <style:paragraph-properties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text" style:name="a844">
      <style:text-properties fo:language="en" fo:country="CH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8">
      <style:text-properties fo:language="en" fo:country="CH"/>
    </style:style>
    <style:style style:family="paragraph" style:name="a849">
      <style:paragraph-properties/>
    </style:style>
    <style:style style:family="text" style:name="a960">
      <style:text-properties fo:language="en" fo:country="CH"/>
    </style:style>
    <style:style style:family="paragraph" style:name="a961">
      <style:paragraph-properties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language="en" fo:country="CH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language="en" fo:country="CH"/>
    </style:style>
    <style:style style:family="paragraph" style:name="a969">
      <style:paragraph-properties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1">
      <style:text-properties fo:language="en" fo:country="CH"/>
    </style:style>
    <style:style style:family="paragraph" style:name="a1002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5">
      <style:table-row-properties style:row-height="0.40556in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language="en" fo:country="CH"/>
    </style:style>
    <style:style style:family="paragraph" style:name="a10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draw:fill="none" draw:stroke="non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2">
      <style:text-properties fo:language="en" fo:country="CH"/>
    </style:style>
    <style:style style:family="paragraph" style:name="a853">
      <style:paragraph-properties/>
    </style:style>
    <style:style style:family="table-cell" style:name="a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6">
      <style:text-properties fo:language="en" fo:country="CH"/>
    </style:style>
    <style:style style:family="paragraph" style:name="a857">
      <style:paragraph-properties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language="en" fo:country="CH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3">
      <style:paragraph-properties/>
    </style:style>
    <style:style style:family="text" style:name="a972">
      <style:text-properties fo:language="en" fo:country="CH"/>
    </style:style>
    <style:style style:family="paragraph" style:name="a973">
      <style:paragraph-properties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6">
      <style:text-properties fo:language="en" fo:country="CH"/>
    </style:style>
    <style:style style:family="table-cell" style:name="a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7">
      <style:paragraph-properties/>
    </style:style>
    <style:style style:family="text" style:name="a976">
      <style:text-properties fo:language="en" fo:country="CH"/>
    </style:style>
    <style:style style:family="paragraph" style:name="a977">
      <style:paragraph-properties/>
    </style:style>
    <style:style style:family="table-cell" style:name="a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0">
      <style:text-properties fo:language="en" fo:country="CH"/>
    </style:style>
    <style:style style:family="paragraph" style:name="a1011">
      <style:paragraph-properties/>
    </style:style>
    <style:style style:family="paragraph" style:name="a10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language="en" fo:country="CH"/>
    </style:style>
    <style:style style:family="graphic" style:name="a10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5">
      <style:paragraph-properties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language="en" fo:country="CH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language="en" fo:country="CH"/>
    </style:style>
    <style:style style:family="paragraph" style:name="a861">
      <style:paragraph-properties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language="en" fo:country="CH"/>
    </style:style>
    <style:style style:family="paragraph" style:name="a865">
      <style:paragraph-properties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8">
      <style:table-row-properties style:row-height="0.40556in"/>
    </style:style>
    <style:style style:family="text" style:name="a910">
      <style:text-properties fo:language="en" fo:country="CH"/>
    </style:style>
    <style:style style:family="text" style:name="a869">
      <style:text-properties fo:language="en" fo:country="CH"/>
    </style:style>
    <style:style style:family="paragraph" style:name="a911">
      <style:paragraph-properties/>
    </style:style>
    <style:style style:family="table-row" style:name="a980">
      <style:table-row-properties style:row-height="0.40556in"/>
    </style:style>
    <style:style style:family="text" style:name="a981">
      <style:text-properties fo:language="en" fo:country="CH"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2">
      <style:paragraph-properties/>
    </style:style>
    <style:style style:family="text" style:name="a914">
      <style:text-properties fo:language="en" fo:country="CH"/>
    </style:style>
    <style:style style:family="paragraph" style:name="a915">
      <style:paragraph-properties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5">
      <style:text-properties fo:language="en" fo:country="CH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6">
      <style:paragraph-properties/>
    </style:style>
    <style:style style:family="text" style:name="a918">
      <style:text-properties fo:language="en" fo:country="CH"/>
    </style:style>
    <style:style style:family="paragraph" style:name="a919">
      <style:paragraph-properties/>
    </style:style>
    <style:style style:family="table-cell" style:name="a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9">
      <style:text-properties fo:language="en" fo:country="CH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2">
      <style:text-properties fo:language="en" fo:country="CH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/>
    </style:style>
    <style:style style:family="paragraph" style:name="a10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6">
      <style:text-properties fo:language="en" fo:country="CH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00">
      <style:table-row-properties style:row-height="0.40556in"/>
    </style:style>
    <style:style style:family="text" style:name="a801">
      <style:text-properties fo:language="en" fo:country="CH"/>
    </style:style>
    <style:style style:family="paragraph" style:name="a870">
      <style:paragraph-properties/>
    </style:style>
    <style:style style:family="paragraph" style:name="a802">
      <style:paragraph-properties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5">
      <style:text-properties fo:language="en" fo:country="CH"/>
    </style:style>
    <style:style style:family="text" style:name="a873">
      <style:text-properties fo:language="en" fo:country="CH"/>
    </style:style>
    <style:style style:family="paragraph" style:name="a806">
      <style:paragraph-properties/>
    </style:style>
    <style:style style:family="paragraph" style:name="a874">
      <style:paragraph-properties/>
    </style:style>
    <style:style style:family="table-cell" style:name="a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9">
      <style:text-properties fo:language="en" fo:country="CH"/>
    </style:style>
    <style:style style:family="text" style:name="a877">
      <style:text-properties fo:language="en" fo:country="CH"/>
    </style:style>
    <style:style style:family="paragraph" style:name="a878">
      <style:paragraph-properties/>
    </style:style>
    <style:style style:family="table-cell" style:name="a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2">
      <style:text-properties fo:language="en" fo:country="CH"/>
    </style:style>
    <style:style style:family="paragraph" style:name="a990">
      <style:paragraph-properties/>
    </style:style>
    <style:style style:family="paragraph" style:name="a923">
      <style:paragraph-properties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3">
      <style:text-properties fo:language="en" fo:country="CH"/>
    </style:style>
    <style:style style:family="table-row" style:name="a926">
      <style:table-row-properties style:row-height="0.40556in"/>
    </style:style>
    <style:style style:family="paragraph" style:name="a994">
      <style:paragraph-properties/>
    </style:style>
    <style:style style:family="text" style:name="a927">
      <style:text-properties fo:language="en" fo:country="CH"/>
    </style:style>
    <style:style style:family="paragraph" style:name="a928">
      <style:paragraph-properties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7">
      <style:text-properties fo:language="en" fo:country="CH"/>
    </style:style>
    <style:style style:family="paragraph" style:name="a998">
      <style:paragraph-properties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/>
    </style:style>
    <style:style style:family="table-cell" style:name="a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3">
      <style:table-row-properties style:row-height="0.40556in"/>
    </style:style>
    <style:style style:family="text" style:name="a881">
      <style:text-properties fo:language="en" fo:country="CH"/>
    </style:style>
    <style:style style:family="text" style:name="a814">
      <style:text-properties fo:language="en" fo:country="CH"/>
    </style:style>
    <style:style style:family="paragraph" style:name="a882">
      <style:paragraph-properties/>
    </style:style>
    <style:style style:family="paragraph" style:name="a815">
      <style:paragraph-properties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5">
      <style:text-properties fo:language="en" fo:country="CH"/>
    </style:style>
    <style:style style:family="text" style:name="a818">
      <style:text-properties fo:language="en" fo:country="CH"/>
    </style:style>
    <style:style style:family="paragraph" style:name="a886">
      <style:paragraph-properties/>
    </style:style>
    <style:style style:family="text" style:name="a819">
      <style:text-properties fo:language="en" fo:country="CH"/>
    </style:style>
    <style:style style:family="table-cell" style:name="a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1">
      <style:text-properties fo:language="en" fo:country="CH"/>
    </style:style>
    <style:style style:family="text" style:name="a889">
      <style:text-properties fo:language="en" fo:country="CH"/>
    </style:style>
    <style:style style:family="paragraph" style:name="a932">
      <style:paragraph-properties/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language="en" fo:country="CH"/>
    </style:style>
    <style:style style:family="paragraph" style:name="a936">
      <style:paragraph-properties/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9">
      <style:text-properties fo:language="en" fo:country="CH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0">
      <style:paragraph-properties/>
    </style:style>
    <style:style style:family="text" style:name="a823">
      <style:text-properties fo:language="en" fo:country="CH"/>
    </style:style>
    <style:style style:family="paragraph" style:name="a824">
      <style:paragraph-properties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3">
      <style:text-properties fo:language="en" fo:country="CH"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4">
      <style:paragraph-properties/>
    </style:style>
    <style:style style:family="text" style:name="a827">
      <style:text-properties fo:language="en" fo:country="CH"/>
    </style:style>
    <style:style style:family="paragraph" style:name="a828">
      <style:paragraph-properties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7">
      <style:table-row-properties style:row-height="0.40556in"/>
    </style:style>
    <style:style style:family="paragraph" style:name="a940">
      <style:paragraph-properties/>
    </style:style>
    <style:style style:family="text" style:name="a898">
      <style:text-properties fo:language="en" fo:country="CH"/>
    </style:style>
    <style:style style:family="paragraph" style:name="a899">
      <style:paragraph-properties/>
    </style:style>
    <style:style style:family="table-cell" style:name="a942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978"/>
    <text:list-style style:name="a941"/>
    <text:list-style style:name="a1061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  <text:list-style style:name="a1099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  <text:list-style style:name="a945"/>
    <text:list-style style:name="a1064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  <text:list-style style:name="a1067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  <text:list-style style:name="a949"/>
    <text:list-style style:name="a883"/>
    <text:list-style style:name="a912"/>
    <text:list-style style:name="a887"/>
    <text:list-style style:name="a850"/>
    <text:list-style style:name="a916"/>
    <text:list-style style:name="a1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4"/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/>
    <text:list-style style:name="a858"/>
    <text:list-style style:name="a821"/>
    <text:list-style style:name="a1008"/>
    <text:list-style style:name="a825"/>
    <text:list-style style:name="a983"/>
    <text:list-style style:name="a829"/>
    <text:list-style style:name="a987"/>
    <text:list-style style:name="a1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4"/>
    <text:list-style style:name="a1102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  <text:list-style style:name="a1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1"/>
    <text:list-style style:name="a920"/>
    <text:list-style style:name="a1105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  <text:list-style style:name="a958"/>
    <text:list-style style:name="a1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5"/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/>
    <text:list-style style:name="a11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2"/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/>
    <text:list-style style:name="a1012"/>
    <text:list-style style:name="a866"/>
    <text:list-style style:name="a1016"/>
    <text:list-style style:name="a833"/>
    <text:list-style style:name="a991"/>
    <text:list-style style:name="a837"/>
    <text:list-style style:name="a995"/>
    <text:list-style style:name="a803"/>
    <text:list-style style:name="a999"/>
    <text:list-style style:name="a962"/>
    <text:list-style style:name="a1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7"/>
    <text:list-style style:name="a11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6"/>
    <text:list-style style:name="a11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3"/>
    <text:list-style style:name="a871"/>
    <text:list-style style:name="a937"/>
    <text:list-style style:name="a900"/>
    <text:list-style style:name="a1020"/>
    <text:list-style style:name="a875"/>
    <text:list-style style:name="a904"/>
    <text:list-style style:name="a1024"/>
    <text:list-style style:name="a879"/>
    <text:list-style style:name="a908"/>
    <text:list-style style:name="a842"/>
    <text:list-style style:name="a1028"/>
    <text:list-style style:name="a846"/>
    <text:list-style style:name="a811"/>
    <text:list-style style:name="a970"/>
    <text:list-style style:name="a816"/>
    <text:list-style style:name="a10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4"/>
  </office:automatic-styles>
  <office:body>
    <office:presentation>
      <draw:page draw:name="Slide1" draw:style-name="a785" draw:master-page-name="Master1-Layout1-title-Title-Slide" presentation:presentation-page-layout-name="Master1-PPL1" draw:id="Slide-256">
        <draw:frame draw:id="id69" presentation:style-name="a788" draw:name="Title 1" svg:x="1.66667in" svg:y="0.70486in" svg:width="10in" svg:height="1.01969in" presentation:class="title" presentation:placeholder="false">
          <draw:text-box>
            <text:p text:style-name="a787" text:class-names="" text:cond-style-name=""><text:span text:style-name="a786" text:class-names="">Test Table Slide</text:span></text:p>
          </draw:text-box>
          <svg:title/>
          <svg:desc/>
        </draw:frame>
        <draw:frame draw:id="id70" presentation:style-name="a791" draw:name="Subtitle 2" svg:x="1.66667in" svg:y="5.94253in" svg:width="10in" svg:height="0.49713in" presentation:class="subtitle" presentation:placeholder="false">
          <draw:text-box>
            <text:p text:style-name="a790" text:class-names="" text:cond-style-name=""><text:span text:style-name="a789" text:class-names="">With footnote</text:span></text:p>
          </draw:text-box>
          <svg:title/>
          <svg:desc/>
        </draw:frame>
        <draw:frame draw:id="id71" draw:name="Table 3" svg:x="2.22222in" svg:y="2.12778in" svg:width="8.88889in" svg:height="3.65in">
          <table:table table:style-name="a79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93" table:default-cell-style-name=""/>
            <table:table-column table:style-name="a794" table:default-cell-style-name=""/>
            <table:table-column table:style-name="a795" table:default-cell-style-name=""/>
            <table:table-column table:style-name="a796" table:default-cell-style-name=""/>
            <table:table-column table:style-name="a797" table:default-cell-style-name=""/>
            <table:table-column table:style-name="a798" table:default-cell-style-name=""/>
            <table:table-column table:style-name="a799" table:default-cell-style-name=""/>
            <table:table-row table:style-name="a800" table:default-cell-style-name="">
              <table:table-cell table:style-name="a804"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able:table-cell>
              <table:table-cell table:style-name="a808" table:number-columns-spanned="3">
                <text:list text:style-name="a807">
                  <text:list-item>
                    <text:p text:style-name="a806" text:class-names="" text:cond-style-name=""><text:span text:style-name="a805" text:class-names="">Class1</text:span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812" table:number-columns-spanned="3">
                <text:list text:style-name="a811">
                  <text:list-item>
                    <text:p text:style-name="a810" text:class-names="" text:cond-style-name=""><text:span text:style-name="a809" text:class-names="">Class2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813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/></text:p>
                  </text:list-item>
                </text:list>
              </table:table-cell>
              <table:table-cell table:style-name="a822" table:number-columns-spanned="2">
                <text:list text:style-name="a821">
                  <text:list-item>
                    <text:p text:style-name="a820" text:class-names="" text:cond-style-name=""><text:span text:style-name="a818" text:class-names="">A merged with B</text:span><text:span text:style-name="a819" text:class-names=""/></text:p>
                  </text:list-item>
                </text:list>
              </table:table-cell>
              <table:covered-table-cell table:style-name=""/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C</text:span></text:p>
                  </text:list-item>
                </text:list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A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B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C</text:span></text:p>
                  </text:list-item>
                </text:list>
              </table:table-cell>
            </table:table-row>
            <table:table-row table:style-name="a839" table:default-cell-style-name=""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R1</text:span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True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False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/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>False</text:span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True</text:span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>True</text:span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R2</text:span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True</text:span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>False</text:span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able:table-cell>
            </table:table-row>
            <table:table-row table:style-name="a897" table:default-cell-style-name="">
              <table:table-cell table:style-name="a901" table:number-rows-spanned="2">
                <text:list text:style-name="a900">
                  <text:list-item>
                    <text:p text:style-name="a899" text:class-names="" text:cond-style-name=""><text:span text:style-name="a898" text:class-names="">R3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False</text:span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False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able:table-cell>
            </table:table-row>
            <table:table-row table:style-name="a926" table:default-cell-style-name="">
              <table:covered-table-cell table:style-name=""/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/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True</text:span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True</text:span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</table:table-row>
            <table:table-row table:style-name="a951" table:default-cell-style-name="">
              <table:table-cell table:style-name="a955" table:number-rows-spanned="3">
                <text:list text:style-name="a954">
                  <text:list-item>
                    <text:p text:style-name="a953" text:class-names="" text:cond-style-name=""><text:span text:style-name="a952" text:class-names="">R4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False</text:span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False</text:span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/></text:p>
                  </text:list-item>
                </text:list>
              </table:table-cell>
            </table:table-row>
            <table:table-row table:style-name="a980" table:default-cell-style-name="">
              <table:covered-table-cell table:style-name=""/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/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True</text:span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True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False</text:span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False</text:span></text:p>
                  </text:list-item>
                </text:list>
              </table:table-cell>
            </table:table-row>
            <table:table-row table:style-name="a1005" table:default-cell-style-name="">
              <table:covered-table-cell table:style-name=""/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True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False</text:span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True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False</text:span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True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False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1030" draw:master-page-name="Master1-Layout2-obj-Title-and-Content" presentation:presentation-page-layout-name="Master1-PPL2" draw:id="Slide-257">
        <draw:frame draw:id="id72" presentation:style-name="a1033" draw:name="Title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1" text:class-names="">Second slide title</text:span></text:p>
          </draw:text-box>
          <svg:title/>
          <svg:desc/>
        </draw:frame>
        <draw:frame draw:id="id73" presentation:style-name="a1048" draw:name="Content Placeholder 2" svg:x="0.91667in" svg:y="1.99653in" svg:width="3.96285in" svg:height="2.33681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Let’s introduce a list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With foo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Bar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And<text:s text:c="1"/></text:span><text:span text:style-name="a1044" text:class-names="">baz</text:span><text:span text:style-name="a1045" text:class-names=""><text:s text:c="1"/>things</text:span></text:p>
              </text:list-item>
            </text:list>
          </draw:text-box>
          <svg:title/>
          <svg:desc/>
        </draw:frame>
        <draw:custom-shape svg:x="6.75904in" svg:y="1.46988in" svg:width="4.45783in" svg:height="4.24096in" draw:id="id74" draw:style-name="a1051" draw:name="Rectangle 3">
          <svg:title/>
          <svg:desc/>
          <text:p text:style-name="a1050" text:class-names="" text:cond-style-name=""><text:span text:style-name="a1049" text:class-names="">A rectangle shape with this text inside.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7">
          <draw:page-thumbnail draw:page-number="2" svg:x="0.75in" svg:y="1.25in" svg:width="6in" svg:height="3.375in" presentation:class="page" draw:id="id75" presentation:style-name="a1052" draw:name="Slide Image Placeholder 1">
            <svg:title/>
            <svg:desc/>
          </draw:page-thumbnail>
          <draw:frame draw:id="id76" presentation:style-name="a1055" draw:name="Notes Placeholder 2" svg:x="0.75in" svg:y="4.8125in" svg:width="6in" svg:height="3.9375in" presentation:class="notes" presentation:placeholder="false">
            <draw:text-box>
              <text:p text:style-name="a1054" text:class-names="" text:cond-style-name=""><text:span text:style-name="a1053" text:class-names="">Some notes on the second slide.</text:span></text:p>
            </draw:text-box>
            <svg:title/>
            <svg:desc/>
          </draw:frame>
          <draw:custom-shape svg:x="4.24826in" svg:y="9.49826in" svg:width="3.25in" svg:height="0.50174in" draw:id="id77" draw:style-name="a1056" draw:name="Slide Number Placeholder 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presentation:notes>
      </draw:page>
      <draw:page draw:name="Slide3" draw:style-name="a1058" draw:master-page-name="Master1-Layout2-obj-Title-and-Content" presentation:presentation-page-layout-name="Master1-PPL2" draw:id="Slide-258">
        <draw:frame draw:id="id78" draw:style-name="a1068" draw:name="TextBox 3" svg:x="2.65052in" svg:y="2.66258in" svg:width="1.6455in" svg:height="1.00977in">
          <draw:text-box>
            <text:list text:style-name="a1061">
              <text:list-item>
                <text:p text:style-name="a1060" text:class-names="" text:cond-style-name=""><text:span text:style-name="a1059" text:class-names="">List item4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List item5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List item6</text:span></text:p>
              </text:list-item>
            </text:list>
          </draw:text-box>
          <svg:title/>
          <svg:desc/>
        </draw:frame>
        <draw:frame draw:id="id79" draw:style-name="a1082" draw:name="TextBox 4" svg:x="4.87055in" svg:y="2.68761in" svg:width="0.71735in" svg:height="1.3127in">
          <draw:text-box>
            <text:list text:style-name="a1072">
              <text:list-item>
                <text:p text:style-name="a1071" text:class-names="" text:cond-style-name=""><text:span text:style-name="a1069" text:class-names="">I</text:span><text:span text:style-name="a1070" text:class-names="">1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I2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I3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I4</text:span></text:p>
              </text:list-item>
            </text:list>
          </draw:text-box>
          <svg:title/>
          <svg:desc/>
        </draw:frame>
        <draw:frame draw:id="id80" draw:style-name="a1093" draw:name="TextBox 5" svg:x="6.16245in" svg:y="2.68761in" svg:width="1.36276in" svg:height="1.00977in">
          <draw:text-box>
            <text:p text:style-name="a1085" text:class-names="" text:cond-style-name=""><text:span text:style-name="a1083" text:class-names="">S</text:span><text:span text:style-name="a1084" text:class-names="">ome info:</text:span></text:p>
            <text:list text:style-name="a1089">
              <text:list-item>
                <text:p text:style-name="a1088" text:class-names="" text:cond-style-name=""><text:span text:style-name="a1086" text:class-names="">I</text:span><text:span text:style-name="a1087" text:class-names="">tem A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Item B</text:span></text:p>
              </text:list-item>
            </text:list>
          </draw:text-box>
          <svg:title/>
          <svg:desc/>
        </draw:frame>
        <draw:frame draw:id="id81" draw:style-name="a1106" draw:name="TextBox 6" svg:x="8.23637in" svg:y="2.68966in" svg:width="1.61668in" svg:height="1.3127in">
          <draw:text-box>
            <text:p text:style-name="a1096" text:class-names="" text:cond-style-name=""><text:span text:style-name="a1094" text:class-names="">M</text:span><text:span text:style-name="a1095" text:class-names="">aybe a list?</text:span></text:p>
            <text:list text:style-name="a1099">
              <text:list-item>
                <text:p text:style-name="a1098" text:class-names="" text:cond-style-name=""><text:span text:style-name="a1097" text:class-names="">List1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List2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List3</text:span></text:p>
              </text:list-item>
            </text:list>
          </draw:text-box>
          <svg:title/>
          <svg:desc/>
        </draw:frame>
        <draw:frame draw:id="id82" draw:style-name="a1116" draw:name="TextBox 7" svg:x="10.28477in" svg:y="2.66258in" svg:width="0.71735in" svg:height="1.00977in">
          <draw:text-box>
            <text:list text:style-name="a1109">
              <text:list-item>
                <text:p text:style-name="a1108" text:class-names="" text:cond-style-name=""><text:span text:style-name="a1107" text:class-names="">l1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l2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l3</text:span></text:p>
              </text:list-item>
            </text:list>
          </draw:text-box>
          <svg:title/>
          <svg:desc/>
        </draw:frame>
        <presentation:notes draw:style-name="a1124">
          <draw:page-thumbnail draw:page-number="3" svg:x="0.75in" svg:y="1.25in" svg:width="6in" svg:height="3.375in" presentation:class="page" draw:id="id83" presentation:style-name="a1117" draw:name="Slide Image Placeholder 1">
            <svg:title/>
            <svg:desc/>
          </draw:page-thumbnail>
          <draw:frame draw:id="id84" presentation:style-name="a1122" draw:name="Notes Placeholder 2" svg:x="0.75in" svg:y="4.8125in" svg:width="6in" svg:height="3.9375in" presentation:class="notes" presentation:placeholder="false">
            <draw:text-box>
              <text:p text:style-name="a1119" text:class-names="" text:cond-style-name=""><text:span text:style-name="a1118" text:class-names="">Final notes on the third slide.</text:span></text:p>
              <text:p text:style-name="a1121" text:class-names="" text:cond-style-name=""><text:span text:style-name="a1120" text:class-names="">Second line of notes.</text:span></text:p>
            </draw:text-box>
            <svg:title/>
            <svg:desc/>
          </draw:frame>
          <draw:custom-shape svg:x="4.24826in" svg:y="9.49826in" svg:width="3.25in" svg:height="0.50174in" draw:id="id85" draw:style-name="a1123" draw:name="Slide Number Placeholder 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ccd2d8"/>
    </style:style>
    <style:style style:family="table-cell" style:name="a776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1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/>
    </style:style>
    <style:style style:family="table-cell" style:name="a782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ccd2d8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23/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0/23/24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0/23/24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0/23/24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0/23/24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0/23/24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0/23/24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0/23/24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0/23/24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0/23/24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0/23/24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0/23/24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xim Lysak</meta:initial-creator>
    <dc:creator>Cesar Berrospi Ramis</dc:creator>
    <meta:creation-date>2024-09-26T09:15:16Z</meta:creation-date>
    <dc:date>2026-06-08T11:01:41Z</dc:date>
    <meta:editing-cycles>21</meta:editing-cycles>
    <meta:editing-duration>PT45615S</meta:editing-duration>
    <meta:document-statistic meta:paragraph-count="62" meta:word-count="113"/>
  </office:meta>
</office:document-meta>
</file>